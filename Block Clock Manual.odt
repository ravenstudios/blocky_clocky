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1972in" table:align="left"/>
    </style:style>
    <style:style style:name="Table1.A" style:family="table-column">
      <style:table-column-properties style:column-width="0.6104in"/>
    </style:style>
    <style:style style:name="Table1.B" style:family="table-column">
      <style:table-column-properties style:column-width="2.5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264in" table:align="left"/>
    </style:style>
    <style:style style:name="Table2.A" style:family="table-column">
      <style:table-column-properties style:column-width="0.6868in"/>
    </style:style>
    <style:style style:name="Table2.B" style:family="table-column">
      <style:table-column-properties style:column-width="2.339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ndom LED Clock – User Manual</text:h>
      <text:h text:style-name="Heading_20_2" text:outline-level="2">Button Layout</text:h>
      <text:p text:style-name="Text_20_body">Buttons are arranged vertically.</text:p>
      <text:p text:style-name="Text_20_body">From top to bottom:</text:p>
      <text:list xml:id="list6408519272720084737" text:style-name="L1">
        <text:list-item>
          <text:p text:style-name="P1">SPEED</text:p>
        </text:list-item>
        <text:list-item>
          <text:p text:style-name="P1">MODE</text:p>
        </text:list-item>
        <text:list-item>
          <text:p text:style-name="P1">UP</text:p>
        </text:list-item>
        <text:list-item>
          <text:p text:style-name="P1">DOWN</text:p>
        </text:list-item>
      </text:list>
      <text:p text:style-name="Horizontal_20_Line"/>
      <text:h text:style-name="Heading_20_1" text:outline-level="1">Overview</text:h>
      <text:p text:style-name="Text_20_body">This clock uses randomly changing LEDs to display the current time.<text:line-break/>A DS1302 real-time clock (RTC) module keeps time even when power is removed.</text:p>
      <text:p text:style-name="Text_20_body">The clock has 4 buttons:</text:p>
      <text:list xml:id="list166990312655920003" text:style-name="L2">
        <text:list-item>
          <text:p text:style-name="P2">SPEED</text:p>
        </text:list-item>
        <text:list-item>
          <text:p text:style-name="P2">MODE</text:p>
        </text:list-item>
        <text:list-item>
          <text:p text:style-name="P2">UP</text:p>
        </text:list-item>
        <text:list-item>
          <text:p text:style-name="P2">DOWN</text:p>
        </text:list-item>
      </text:list>
      <text:p text:style-name="Horizontal_20_Line"/>
      <text:h text:style-name="Heading_20_1" text:outline-level="1">Normal Clock Mode</text:h>
      <text:p text:style-name="Text_20_body">In normal mode, the LEDs display the current time.</text:p>
      <text:p text:style-name="Text_20_body">The colon LED blinks every second.</text:p>
      <text:p text:style-name="Text_20_body">The random LED pattern changes automatically.</text:p>
      <text:h text:style-name="Heading_20_2" text:outline-level="2">Change LED Animation Speed</text:h>
      <text:p text:style-name="Text_20_body">Press the <text:span text:style-name="Strong_20_Emphasis">SPEED</text:span> button while in normal mode.</text:p>
      <text:p text:style-name="Text_20_body">Available speeds:</text:p>
      <text:list xml:id="list5702560821137881826" text:style-name="L3">
        <text:list-item>
          <text:p text:style-name="P3">Very Fast</text:p>
        </text:list-item>
        <text:list-item>
          <text:p text:style-name="P3">Fast</text:p>
        </text:list-item>
        <text:list-item>
          <text:p text:style-name="P3">Medium</text:p>
        </text:list-item>
        <text:list-item>
          <text:p text:style-name="P3"><text:soft-page-break/>Slow</text:p>
        </text:list-item>
        <text:list-item>
          <text:p text:style-name="P3">Very Slow</text:p>
        </text:list-item>
      </text:list>
      <text:p text:style-name="Text_20_body">Each press cycles to the next speed.</text:p>
      <text:p text:style-name="Horizontal_20_Line"/>
      <text:h text:style-name="Heading_20_1" text:outline-level="1">Setting the Time</text:h>
      <text:h text:style-name="Heading_20_2" text:outline-level="2">Enter Time Set Mode</text:h>
      <text:p text:style-name="Text_20_body">Press the <text:span text:style-name="Strong_20_Emphasis">MODE</text:span> button until the clock enters time-setting mode.</text:p>
      <text:p text:style-name="Text_20_body">The hour LEDs will light.</text:p>
      <text:p text:style-name="Horizontal_20_Line"/>
      <text:h text:style-name="Heading_20_2" text:outline-level="2">Select Hours or Minutes</text:h>
      <text:p text:style-name="Text_20_body">Press the <text:span text:style-name="Strong_20_Emphasis">SPEED</text:span> button to switch between:</text:p>
      <text:list xml:id="list8254562101835868560" text:style-name="L4">
        <text:list-item>
          <text:p text:style-name="P4">Hours</text:p>
        </text:list-item>
        <text:list-item>
          <text:p text:style-name="P4">Minutes</text:p>
        </text:list-item>
      </text:list>
      <text:p text:style-name="Text_20_body">The active section will light.</text:p>
      <text:p text:style-name="Horizontal_20_Line"/>
      <text:h text:style-name="Heading_20_2" text:outline-level="2">Adjust Time</text:h>
      <text:p text:style-name="Text_20_body">Use:</text:p>
      <text:list xml:id="list4335243153279264027" text:style-name="L5">
        <text:list-item>
          <text:p text:style-name="P5"><text:span text:style-name="Strong_20_Emphasis">UP</text:span> to increase</text:p>
        </text:list-item>
        <text:list-item>
          <text:p text:style-name="P5"><text:span text:style-name="Strong_20_Emphasis">DOWN</text:span> to decrease</text:p>
        </text:list-item>
      </text:list>
      <text:p text:style-name="Text_20_body">Hours wrap around from 23 → 0<text:line-break/>Minutes wrap around from 59 → 0</text:p>
      <text:p text:style-name="Horizontal_20_Line"/>
      <text:h text:style-name="Heading_20_2" text:outline-level="2">Save Time</text:h>
      <text:p text:style-name="Text_20_body">Press the <text:span text:style-name="Strong_20_Emphasis">MODE</text:span> button to leave time-setting mode.</text:p>
      <text:p text:style-name="Text_20_body">The time is automatically saved to the RTC.</text:p>
      <text:p text:style-name="Horizontal_20_Line"/>
      <text:h text:style-name="Heading_20_1" text:outline-level="1"><text:soft-page-break/>12-Hour / 24-Hour Mode</text:h>
      <text:p text:style-name="Text_20_body">Press the <text:span text:style-name="Strong_20_Emphasis">MODE</text:span> button until the clock enters 12/24-hour mode.</text:p>
      <text:h text:style-name="Heading_20_2" text:outline-level="2">Select Mode</text:h>
      <text:list xml:id="list3099378613338284318" text:style-name="L6">
        <text:list-item>
          <text:p text:style-name="P6">Press <text:span text:style-name="Strong_20_Emphasis">UP</text:span> for 24-hour mode</text:p>
        </text:list-item>
        <text:list-item>
          <text:p text:style-name="P6">Press <text:span text:style-name="Strong_20_Emphasis">DOWN</text:span> for 12-hour mode</text:p>
        </text:list-item>
      </text:list>
      <text:p text:style-name="Text_20_body">Press <text:span text:style-name="Strong_20_Emphasis">MODE</text:span> again to return to the clock.</text:p>
      <text:p text:style-name="Horizontal_20_Line"/>
      <text:h text:style-name="Heading_20_1" text:outline-level="1">RTC Reset / Recovery</text:h>
      <text:p text:style-name="Text_20_body">If the RTC loses power or becomes corrupted, the clock may display invalid time values.</text:p>
      <text:h text:style-name="Heading_20_2" text:outline-level="2">Reset RTC to Default Time</text:h>
      <text:list xml:id="list9064299394957157710" text:style-name="L7">
        <text:list-item>
          <text:p text:style-name="P7">Power OFF the clock</text:p>
        </text:list-item>
        <text:list-item>
          <text:p text:style-name="P7">Hold both:</text:p>
          <text:list>
            <text:list-item>
              <text:p text:style-name="P7">UP</text:p>
            </text:list-item>
            <text:list-item>
              <text:p text:style-name="P7">DOWN</text:p>
            </text:list-item>
          </text:list>
        </text:list-item>
        <text:list-item>
          <text:p text:style-name="P7">Power ON the clock while holding both buttons</text:p>
        </text:list-item>
      </text:list>
      <text:p text:style-name="Text_20_body">The RTC will reset to the default programmed date and time.</text:p>
      <text:p text:style-name="Horizontal_20_Line"/>
      <text:h text:style-name="Heading_20_1" text:outline-level="1">LED Display Behavior</text:h>
      <text:p text:style-name="Text_20_body">The LEDs are randomized each refresh.</text:p>
      <text:p text:style-name="Text_20_body">This means the LED pattern changes continuously while still representing the correct time.</text:p>
      <text:p text:style-name="Text_20_body">The number of illuminated LEDs corresponds to the displayed number.</text:p>
      <text:p text:style-name="Text_20_body">Example:</text:p>
      <text:list xml:id="list4286979578893397735" text:style-name="L8">
        <text:list-item>
          <text:p text:style-name="P8">5 = five LEDs lit</text:p>
        </text:list-item>
        <text:list-item>
          <text:p text:style-name="P8">2 = two LEDs lit</text:p>
        </text:list-item>
      </text:list>
      <text:p text:style-name="Horizontal_20_Line"/>
      <text:h text:style-name="Heading_20_1" text:outline-level="1"><text:soft-page-break/>Hardware</text:h>
      <text:h text:style-name="Heading_20_2" text:outline-level="2">Main Components</text:h>
      <text:list xml:id="list8156659198625385122" text:style-name="L9">
        <text:list-item>
          <text:p text:style-name="P9">RP2040 Microcontroller</text:p>
        </text:list-item>
        <text:list-item>
          <text:p text:style-name="P9">DS1302 RTC</text:p>
        </text:list-item>
        <text:list-item>
          <text:p text:style-name="P9">74HC595 Shift Registers</text:p>
        </text:list-item>
        <text:list-item>
          <text:p text:style-name="P9">LEDs</text:p>
        </text:list-item>
        <text:list-item>
          <text:p text:style-name="P9">4 Push Buttons</text:p>
        </text:list-item>
      </text:list>
      <text:p text:style-name="Horizontal_20_Line"/>
      <text:h text:style-name="Heading_20_1" text:outline-level="1">Troubleshooting</text:h>
      <text:h text:style-name="Heading_20_2" text:outline-level="2">Clock Shows Wrong Time</text:h>
      <text:p text:style-name="Text_20_body">Enter time-setting mode and adjust the clock.</text:p>
      <text:p text:style-name="Text_20_body">If the time is completely corrupted:</text:p>
      <text:list xml:id="list8990576009028225166" text:style-name="L10">
        <text:list-item>
          <text:p text:style-name="P10">Perform the RTC reset procedure.</text:p>
        </text:list-item>
      </text:list>
      <text:p text:style-name="Horizontal_20_Line"/>
      <text:h text:style-name="Heading_20_2" text:outline-level="2">LEDs Frozen</text:h>
      <text:p text:style-name="Text_20_body">Restart the clock.</text:p>
      <text:p text:style-name="Horizontal_20_Line"/>
      <text:h text:style-name="Heading_20_2" text:outline-level="2">Clock Does Not Keep Time</text:h>
      <text:p text:style-name="Text_20_body">Check:</text:p>
      <text:list xml:id="list9007785559261919924" text:style-name="L11">
        <text:list-item>
          <text:p text:style-name="P11">RTC backup battery</text:p>
        </text:list-item>
        <text:list-item>
          <text:p text:style-name="P11">RTC wiring</text:p>
        </text:list-item>
        <text:list-item>
          <text:p text:style-name="P11">DS1302 module</text:p>
        </text:list-item>
      </text:list>
      <text:p text:style-name="Horizontal_20_Line"/>
      <text:h text:style-name="Heading_20_1" text:outline-level="1">Controls Quick Referenc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utton</text:p>
            </table:table-cell>
            <table:table-cell table:style-name="Table1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1.A1" office:value-type="string">
            <text:p text:style-name="Table_20_Contents">SPEED</text:p>
          </table:table-cell>
          <table:table-cell table:style-name="Table1.A1" office:value-type="string">
            <text:p text:style-name="Table_20_Contents">Change speed / switch hours-minutes</text:p>
          </table:table-cell>
        </table:table-row>
        <text:soft-page-break/>
        <table:table-row>
          <table:table-cell table:style-name="Table1.A1" office:value-type="string">
            <text:p text:style-name="Table_20_Contents">MODE</text:p>
          </table:table-cell>
          <table:table-cell table:style-name="Table1.A1" office:value-type="string">
            <text:p text:style-name="Table_20_Contents">Change mode</text:p>
          </table:table-cell>
        </table:table-row>
        <table:table-row>
          <table:table-cell table:style-name="Table1.A1" office:value-type="string">
            <text:p text:style-name="Table_20_Contents">UP</text:p>
          </table:table-cell>
          <table:table-cell table:style-name="Table1.A1" office:value-type="string">
            <text:p text:style-name="Table_20_Contents">Increase value</text:p>
          </table:table-cell>
        </table:table-row>
        <table:table-row>
          <table:table-cell table:style-name="Table1.A1" office:value-type="string">
            <text:p text:style-name="Table_20_Contents">DOWN</text:p>
          </table:table-cell>
          <table:table-cell table:style-name="Table1.A1" office:value-type="string">
            <text:p text:style-name="Table_20_Contents">Decrease value</text:p>
          </table:table-cell>
        </table:table-row>
      </table:table>
      <text:p text:style-name="Horizontal_20_Line"/>
      <text:h text:style-name="Heading_20_1" text:outline-level="1">Mod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od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Run</text:p>
          </table:table-cell>
          <table:table-cell table:style-name="Table2.A1" office:value-type="string">
            <text:p text:style-name="Table_20_Contents">Normal clock display</text:p>
          </table:table-cell>
        </table:table-row>
        <table:table-row>
          <table:table-cell table:style-name="Table2.A1" office:value-type="string">
            <text:p text:style-name="Table_20_Contents">Set Time</text:p>
          </table:table-cell>
          <table:table-cell table:style-name="Table2.A1" office:value-type="string">
            <text:p text:style-name="Table_20_Contents">Adjust hours and minutes</text:p>
          </table:table-cell>
        </table:table-row>
        <table:table-row>
          <table:table-cell table:style-name="Table2.A1" office:value-type="string">
            <text:p text:style-name="Table_20_Contents">12/24</text:p>
          </table:table-cell>
          <table:table-cell table:style-name="Table2.A1" office:value-type="string">
            <text:p text:style-name="Table_20_Contents">Select 12-hour or 24-hour displ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ert Dodson</meta:initial-creator>
    <meta:creation-date>2026-06-07T12:43:10</meta:creation-date>
    <meta:document-statistic meta:table-count="2" meta:image-count="0" meta:object-count="0" meta:page-count="5" meta:paragraph-count="106" meta:word-count="444" meta:character-count="2377"/>
    <dc:date>2026-06-07T12:44:24</dc:date>
    <dc:creator>Robeert Dodson</dc:creator>
    <meta:editing-duration>PT1M14S</meta:editing-duration>
    <meta:editing-cycles>1</meta:editing-cycles>
    <meta:generator>OpenOffice/4.1.15$Unix OpenOffice.org_project/4115m2$Build-9813</meta:generator>
  </office:meta>
</office:document-meta>
</file>